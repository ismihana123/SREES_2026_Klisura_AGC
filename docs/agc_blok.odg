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graphics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office:version="1.2">
  <office:automatic-styles>
    <style:style style:name="grIn" style:family="graphic">
      <style:graphic-properties draw:fill="solid" draw:fill-color="#eeeeee" svg:stroke-color="#555555" svg:stroke-width="0.05cm" draw:textarea-vertical-align="middle" draw:textarea-horizontal-align="center" fo:padding-top="0.08cm" fo:padding-bottom="0.08cm" fo:padding-left="0.1cm" fo:padding-right="0.1cm"/>
    </style:style>
    <style:style style:name="grPlg" style:family="graphic">
      <style:graphic-properties draw:fill="solid" draw:fill-color="#dbe9f7" svg:stroke-color="#2e5b8f" svg:stroke-width="0.05cm" draw:textarea-vertical-align="middle" draw:textarea-horizontal-align="center" fo:padding-top="0.08cm" fo:padding-bottom="0.08cm" fo:padding-left="0.1cm" fo:padding-right="0.1cm"/>
    </style:style>
    <style:style style:name="grThr" style:family="graphic">
      <style:graphic-properties draw:fill="solid" draw:fill-color="#ffffff" svg:stroke-color="#2e5b8f" svg:stroke-width="0.05cm" draw:textarea-vertical-align="middle" draw:textarea-horizontal-align="center" fo:padding-top="0.08cm" fo:padding-bottom="0.08cm" fo:padding-left="0.1cm" fo:padding-right="0.1cm"/>
    </style:style>
    <style:style style:name="grOut" style:family="graphic">
      <style:graphic-properties draw:fill="solid" draw:fill-color="#fdf3d0" svg:stroke-color="#b08a2e" svg:stroke-width="0.05cm" draw:textarea-vertical-align="middle" draw:textarea-horizontal-align="center" fo:padding-top="0.08cm" fo:padding-bottom="0.08cm" fo:padding-left="0.1cm" fo:padding-right="0.1cm"/>
    </style:style>
    <style:style style:name="grTwn" style:family="graphic">
      <style:graphic-properties draw:fill="solid" draw:fill-color="#ddf0dd" svg:stroke-color="#2e7d32" svg:stroke-width="0.05cm" draw:textarea-vertical-align="middle" draw:textarea-horizontal-align="center" fo:padding-top="0.08cm" fo:padding-bottom="0.08cm" fo:padding-left="0.1cm" fo:padding-right="0.1cm"/>
    </style:style>
    <style:style style:name="grLim" style:family="graphic">
      <style:graphic-properties draw:fill="solid" draw:fill-color="#fde4d0" svg:stroke-color="#b0602e" svg:stroke-width="0.05cm" draw:textarea-vertical-align="middle" draw:textarea-horizontal-align="center" fo:padding-top="0.08cm" fo:padding-bottom="0.08cm" fo:padding-left="0.1cm" fo:padding-right="0.1cm"/>
    </style:style>
    <style:style style:name="grLbl" style:family="graphic">
      <style:graphic-properties draw:fill="none" draw:stroke="none" draw:textarea-vertical-align="middle" draw:textarea-horizontal-align="center" fo:padding-top="0.08cm" fo:padding-bottom="0.08cm" fo:padding-left="0.1cm" fo:padding-right="0.1cm"/>
    </style:style>
    <style:style style:name="grArrow" style:family="graphic">
      <style:graphic-properties draw:stroke="solid" svg:stroke-width="0.06cm" svg:stroke-color="#333333" draw:marker-end="ArrowEnd" draw:marker-end-width="0.35cm" draw:fill="none"/>
    </style:style>
    <style:style style:name="grLine" style:family="graphic">
      <style:graphic-properties draw:stroke="solid" svg:stroke-width="0.06cm" svg:stroke-color="#333333" draw:fill="none"/>
    </style:style>
    <style:style style:name="P1" style:family="paragraph">
      <style:paragraph-properties fo:text-align="center"/>
      <style:text-properties fo:font-size="11pt" fo:font-family="Arial"/>
    </style:style>
    <style:style style:name="P2" style:family="paragraph">
      <style:paragraph-properties fo:text-align="center"/>
      <style:text-properties fo:font-size="12pt" fo:font-family="Arial" fo:font-weight="bold"/>
    </style:style>
    <style:style style:name="P3" style:family="paragraph">
      <style:paragraph-properties fo:text-align="center"/>
      <style:text-properties fo:font-size="10pt" fo:font-family="Arial"/>
    </style:style>
    <style:style style:name="PB" style:family="paragraph">
      <style:paragraph-properties fo:text-align="center"/>
      <style:text-properties fo:font-size="13pt" fo:font-family="Arial" fo:font-weight="bold"/>
    </style:style>
  </office:automatic-styles>
  <office:body>
    <office:drawing>
      <draw:page draw:name="page1" draw:master-page-name="Default">
        <draw:rect draw:style-name="grLbl" svg:x="6.0cm" svg:y="0.6cm" svg:width="17cm" svg:height="1.0cm" draw:corner-radius="0.15cm">
          <text:p text:style-name="P2">Blok šema AGC regulacije (primarna + sekundarna petlja)</text:p>
        </draw:rect>
        <draw:rect draw:style-name="grIn" svg:x="0.8cm" svg:y="9.1cm" svg:width="2.8cm" svg:height="1.6cm" draw:corner-radius="0.15cm">
          <text:p text:style-name="P1">Δω =</text:p>
          <text:p text:style-name="P1">1 − ω</text:p>
        </draw:rect>
        <draw:rect draw:style-name="grPlg" svg:x="5.4cm" svg:y="6.2cm" svg:width="4.8cm" svg:height="1.9cm" draw:corner-radius="0.15cm">
          <text:p text:style-name="P1">Kp (droop)</text:p>
          <text:p text:style-name="P1">primarna regulacija</text:p>
        </draw:rect>
        <draw:rect draw:style-name="grPlg" svg:x="5.4cm" svg:y="11.6cm" svg:width="4.8cm" svg:height="1.9cm" draw:corner-radius="0.15cm">
          <text:p text:style-name="P1">Ki / s (integrator)</text:p>
          <text:p text:style-name="P1">sekundarna – AGC</text:p>
        </draw:rect>
        <draw:ellipse draw:style-name="grThr" svg:x="11.6cm" svg:y="9.15cm" svg:width="1.5cm" svg:height="1.5cm">
          <text:p text:style-name="PB">+</text:p>
        </draw:ellipse>
        <draw:rect draw:style-name="grIn" svg:x="11.4cm" svg:y="5.7cm" svg:width="1.9cm" svg:height="1.3cm" draw:corner-radius="0.15cm">
          <text:p text:style-name="P1">Pref</text:p>
        </draw:rect>
        <draw:rect draw:style-name="grPlg" svg:x="14.3cm" svg:y="9.0cm" svg:width="4.8cm" svg:height="1.9cm" draw:corner-radius="0.15cm">
          <text:p text:style-name="P1">1 / (1 + s·Tgov)</text:p>
          <text:p text:style-name="P1">governor / turbina</text:p>
        </draw:rect>
        <draw:rect draw:style-name="grLim" svg:x="20.2cm" svg:y="9.0cm" svg:width="3.4cm" svg:height="1.9cm" draw:corner-radius="0.15cm">
          <text:p text:style-name="P1">Limiter</text:p>
          <text:p text:style-name="P1">[Pmin, Pmax]</text:p>
        </draw:rect>
        <draw:rect draw:style-name="grTwn" svg:x="24.8cm" svg:y="9.0cm" svg:width="4.2cm" svg:height="1.9cm" draw:corner-radius="0.15cm">
          <text:p text:style-name="P1">Njihajna jednačina</text:p>
          <text:p text:style-name="P1">(2H, D) → ω</text:p>
        </draw:rect>
        <draw:line draw:style-name="grLine" svg:x1="3.6cm" svg:y1="9.9cm" svg:x2="4.7cm" svg:y2="9.9cm"/>
        <draw:line draw:style-name="grLine" svg:x1="4.7cm" svg:y1="9.9cm" svg:x2="4.7cm" svg:y2="7.15cm"/>
        <draw:line draw:style-name="grArrow" svg:x1="4.7cm" svg:y1="7.15cm" svg:x2="5.4cm" svg:y2="7.15cm"/>
        <draw:line draw:style-name="grLine" svg:x1="4.7cm" svg:y1="9.9cm" svg:x2="4.7cm" svg:y2="12.55cm"/>
        <draw:line draw:style-name="grArrow" svg:x1="4.7cm" svg:y1="12.55cm" svg:x2="5.4cm" svg:y2="12.55cm"/>
        <draw:line draw:style-name="grArrow" svg:x1="10.2cm" svg:y1="7.15cm" svg:x2="11.9cm" svg:y2="9.25cm"/>
        <draw:line draw:style-name="grArrow" svg:x1="10.2cm" svg:y1="12.55cm" svg:x2="11.9cm" svg:y2="10.55cm"/>
        <draw:line draw:style-name="grArrow" svg:x1="12.35cm" svg:y1="7.0cm" svg:x2="12.35cm" svg:y2="9.15cm"/>
        <draw:line draw:style-name="grArrow" svg:x1="13.1cm" svg:y1="9.9cm" svg:x2="14.3cm" svg:y2="9.95cm"/>
        <draw:line draw:style-name="grArrow" svg:x1="19.1cm" svg:y1="9.95cm" svg:x2="20.2cm" svg:y2="9.95cm"/>
        <draw:rect draw:style-name="grLbl" svg:x="23.1cm" svg:y="9.1cm" svg:width="1.4cm" svg:height="0.8cm" draw:corner-radius="0.15cm">
          <text:p text:style-name="P3">Pm_lim</text:p>
        </draw:rect>
        <draw:line draw:style-name="grArrow" svg:x1="23.6cm" svg:y1="9.95cm" svg:x2="24.8cm" svg:y2="9.95cm"/>
        <draw:line draw:style-name="grLine" svg:x1="26.9cm" svg:y1="10.9cm" svg:x2="26.9cm" svg:y2="14.6cm"/>
        <draw:line draw:style-name="grLine" svg:x1="26.9cm" svg:y1="14.6cm" svg:x2="2.2cm" svg:y2="14.6cm"/>
        <draw:line draw:style-name="grArrow" svg:x1="2.2cm" svg:y1="14.6cm" svg:x2="2.2cm" svg:y2="10.7cm"/>
        <draw:rect draw:style-name="grLbl" svg:x="27.1cm" svg:y="11.3cm" svg:width="1.2cm" svg:height="0.8cm" draw:corner-radius="0.15cm">
          <text:p text:style-name="P3">ω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draw="urn:oasis:names:tc:opendocument:xmlns:drawing:1.0" xmlns:svg="urn:oasis:names:tc:opendocument:xmlns:svg-compatible:1.0" office:version="1.2">
  <office:styles>
    <draw:marker draw:name="ArrowEnd" svg:viewBox="0 0 20 30" svg:d="m10 0-10 30h20z"/>
  </office:styles>
  <office:automatic-styles>
    <style:page-layout style:name="PM1">
      <style:page-layout-properties fo:page-width="29.7cm" fo:page-height="21cm" style:print-orientation="landscape" fo:margin-top="0.5cm" fo:margin-bottom="0.5cm" fo:margin-left="0.5cm" fo:margin-right="0.5cm"/>
    </style:page-layout>
  </office:automatic-styles>
  <office:master-styles>
    <style:master-page style:name="Default" style:page-layout-name="PM1"/>
  </office:master-styles>
</office:document-styles>
</file>