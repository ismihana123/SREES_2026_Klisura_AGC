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graphics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svg="urn:oasis:names:tc:opendocument:xmlns:svg-compatible:1.0" office:version="1.2">
  <office:automatic-styles>
    <style:style style:name="grIn" style:family="graphic">
      <style:graphic-properties draw:fill="solid" draw:fill-color="#eeeeee" svg:stroke-color="#555555" svg:stroke-width="0.05cm" draw:textarea-vertical-align="middle" draw:textarea-horizontal-align="center" fo:padding-top="0.08cm" fo:padding-bottom="0.08cm" fo:padding-left="0.1cm" fo:padding-right="0.1cm"/>
    </style:style>
    <style:style style:name="grPlg" style:family="graphic">
      <style:graphic-properties draw:fill="solid" draw:fill-color="#dbe9f7" svg:stroke-color="#2e5b8f" svg:stroke-width="0.05cm" draw:textarea-vertical-align="middle" draw:textarea-horizontal-align="center" fo:padding-top="0.08cm" fo:padding-bottom="0.08cm" fo:padding-left="0.1cm" fo:padding-right="0.1cm"/>
    </style:style>
    <style:style style:name="grThr" style:family="graphic">
      <style:graphic-properties draw:fill="solid" draw:fill-color="#ffffff" svg:stroke-color="#2e5b8f" svg:stroke-width="0.05cm" draw:textarea-vertical-align="middle" draw:textarea-horizontal-align="center" fo:padding-top="0.08cm" fo:padding-bottom="0.08cm" fo:padding-left="0.1cm" fo:padding-right="0.1cm"/>
    </style:style>
    <style:style style:name="grOut" style:family="graphic">
      <style:graphic-properties draw:fill="solid" draw:fill-color="#fdf3d0" svg:stroke-color="#b08a2e" svg:stroke-width="0.05cm" draw:textarea-vertical-align="middle" draw:textarea-horizontal-align="center" fo:padding-top="0.08cm" fo:padding-bottom="0.08cm" fo:padding-left="0.1cm" fo:padding-right="0.1cm"/>
    </style:style>
    <style:style style:name="grTwn" style:family="graphic">
      <style:graphic-properties draw:fill="solid" draw:fill-color="#ddf0dd" svg:stroke-color="#2e7d32" svg:stroke-width="0.05cm" draw:textarea-vertical-align="middle" draw:textarea-horizontal-align="center" fo:padding-top="0.08cm" fo:padding-bottom="0.08cm" fo:padding-left="0.1cm" fo:padding-right="0.1cm"/>
    </style:style>
    <style:style style:name="grLim" style:family="graphic">
      <style:graphic-properties draw:fill="solid" draw:fill-color="#fde4d0" svg:stroke-color="#b0602e" svg:stroke-width="0.05cm" draw:textarea-vertical-align="middle" draw:textarea-horizontal-align="center" fo:padding-top="0.08cm" fo:padding-bottom="0.08cm" fo:padding-left="0.1cm" fo:padding-right="0.1cm"/>
    </style:style>
    <style:style style:name="grLbl" style:family="graphic">
      <style:graphic-properties draw:fill="none" draw:stroke="none" draw:textarea-vertical-align="middle" draw:textarea-horizontal-align="center" fo:padding-top="0.08cm" fo:padding-bottom="0.08cm" fo:padding-left="0.1cm" fo:padding-right="0.1cm"/>
    </style:style>
    <style:style style:name="grArrow" style:family="graphic">
      <style:graphic-properties draw:stroke="solid" svg:stroke-width="0.06cm" svg:stroke-color="#333333" draw:marker-end="ArrowEnd" draw:marker-end-width="0.35cm" draw:fill="none"/>
    </style:style>
    <style:style style:name="grLine" style:family="graphic">
      <style:graphic-properties draw:stroke="solid" svg:stroke-width="0.06cm" svg:stroke-color="#333333" draw:fill="none"/>
    </style:style>
    <style:style style:name="P1" style:family="paragraph">
      <style:paragraph-properties fo:text-align="center"/>
      <style:text-properties fo:font-size="11pt" fo:font-family="Arial"/>
    </style:style>
    <style:style style:name="P2" style:family="paragraph">
      <style:paragraph-properties fo:text-align="center"/>
      <style:text-properties fo:font-size="12pt" fo:font-family="Arial" fo:font-weight="bold"/>
    </style:style>
    <style:style style:name="P3" style:family="paragraph">
      <style:paragraph-properties fo:text-align="center"/>
      <style:text-properties fo:font-size="10pt" fo:font-family="Arial"/>
    </style:style>
    <style:style style:name="PB" style:family="paragraph">
      <style:paragraph-properties fo:text-align="center"/>
      <style:text-properties fo:font-size="13pt" fo:font-family="Arial" fo:font-weight="bold"/>
    </style:style>
  </office:automatic-styles>
  <office:body>
    <office:drawing>
      <draw:page draw:name="page1" draw:master-page-name="Default">
        <draw:rect draw:style-name="grLbl" svg:x="6.0cm" svg:y="0.6cm" svg:width="17cm" svg:height="1.0cm" draw:corner-radius="0.15cm">
          <text:p text:style-name="P2">Arhitektura AGC dinamičkog konvertora</text:p>
        </draw:rect>
        <draw:rect draw:style-name="grIn" svg:x="0.8cm" svg:y="4.6cm" svg:width="5.4cm" svg:height="2.2cm" draw:corner-radius="0.15cm">
          <text:p text:style-name="P1">XML konfiguracija</text:p>
          <text:p text:style-name="P1">(AGCConfig:</text:p>
          <text:p text:style-name="P1">generatori sa AGC tipom)</text:p>
        </draw:rect>
        <draw:rect draw:style-name="grIn" svg:x="0.8cm" svg:y="11.8cm" svg:width="5.4cm" svg:height="2.6cm" draw:corner-radius="0.15cm">
          <text:p text:style-name="P1">CSV mrežni podaci</text:p>
          <text:p text:style-name="P1">case30 / 118 / 300</text:p>
          <text:p text:style-name="P1">(sabirnice + grane)</text:p>
          <text:p text:style-name="P1">[case9 ugrađen]</text:p>
        </draw:rect>
        <draw:rect draw:style-name="grPlg" svg:x="8.0cm" svg:y="3.4cm" svg:width="8.6cm" svg:height="13.2cm" draw:corner-radius="0.15cm"/>
        <draw:rect draw:style-name="grLbl" svg:x="8.3cm" svg:y="3.7cm" svg:width="8.0cm" svg:height="1.6cm" draw:corner-radius="0.15cm">
          <text:p text:style-name="P2">AGC Plugin (agc.dll)</text:p>
          <text:p text:style-name="P2">natID GUI: Converter + Options</text:p>
        </draw:rect>
        <draw:rect draw:style-name="grThr" svg:x="8.7cm" svg:y="6.6cm" svg:width="7.2cm" svg:height="3.2cm" draw:corner-radius="0.15cm">
          <text:p text:style-name="P1">Thread 1: konverzija</text:p>
          <text:p text:style-name="P1">XML/CSV parser → Ybus</text:p>
          <text:p text:style-name="P1">(natID dense matrice) →</text:p>
          <text:p text:style-name="P1">generisanje modela</text:p>
        </draw:rect>
        <draw:rect draw:style-name="grThr" svg:x="8.7cm" svg:y="11.4cm" svg:width="7.2cm" svg:height="2.6cm" draw:corner-radius="0.15cm">
          <text:p text:style-name="P1">Thread 2:</text:p>
          <text:p text:style-name="P1">real-time progress</text:p>
          <text:p text:style-name="P1">indikator (atomic)</text:p>
        </draw:rect>
        <draw:rect draw:style-name="grOut" svg:x="19.2cm" svg:y="5.9cm" svg:width="4.4cm" svg:height="2.0cm" draw:corner-radius="0.15cm">
          <text:p text:style-name="P1">agc_output.dmodl</text:p>
          <text:p text:style-name="P1">(dinamički model)</text:p>
        </draw:rect>
        <draw:rect draw:style-name="grOut" svg:x="19.2cm" svg:y="10.9cm" svg:width="4.4cm" svg:height="2.0cm" draw:corner-radius="0.15cm">
          <text:p text:style-name="P1">agc_output.vmodl</text:p>
          <text:p text:style-name="P1">(definicije grafika)</text:p>
        </draw:rect>
        <draw:rect draw:style-name="grTwn" svg:x="25.0cm" svg:y="8.3cm" svg:width="4.0cm" svg:height="3.0cm" draw:corner-radius="0.15cm">
          <text:p text:style-name="P1">dTwin</text:p>
          <text:p text:style-name="P1">Solve → Plot</text:p>
        </draw:rect>
        <draw:line draw:style-name="grArrow" svg:x1="6.2cm" svg:y1="5.7cm" svg:x2="8.0cm" svg:y2="5.7cm"/>
        <draw:line draw:style-name="grArrow" svg:x1="6.2cm" svg:y1="13.1cm" svg:x2="8.0cm" svg:y2="13.1cm"/>
        <draw:line draw:style-name="grArrow" svg:x1="16.6cm" svg:y1="6.9cm" svg:x2="19.2cm" svg:y2="6.9cm"/>
        <draw:line draw:style-name="grArrow" svg:x1="16.6cm" svg:y1="11.9cm" svg:x2="19.2cm" svg:y2="11.9cm"/>
        <draw:line draw:style-name="grArrow" svg:x1="23.6cm" svg:y1="6.9cm" svg:x2="25.0cm" svg:y2="9.1cm"/>
        <draw:line draw:style-name="grArrow" svg:x1="23.6cm" svg:y1="11.9cm" svg:x2="25.0cm" svg:y2="10.5cm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draw="urn:oasis:names:tc:opendocument:xmlns:drawing:1.0" xmlns:svg="urn:oasis:names:tc:opendocument:xmlns:svg-compatible:1.0" office:version="1.2">
  <office:styles>
    <draw:marker draw:name="ArrowEnd" svg:viewBox="0 0 20 30" svg:d="m10 0-10 30h20z"/>
  </office:styles>
  <office:automatic-styles>
    <style:page-layout style:name="PM1">
      <style:page-layout-properties fo:page-width="29.7cm" fo:page-height="21cm" style:print-orientation="landscape" fo:margin-top="0.5cm" fo:margin-bottom="0.5cm" fo:margin-left="0.5cm" fo:margin-right="0.5cm"/>
    </style:page-layout>
  </office:automatic-styles>
  <office:master-styles>
    <style:master-page style:name="Default" style:page-layout-name="PM1"/>
  </office:master-styles>
</office:document-styles>
</file>